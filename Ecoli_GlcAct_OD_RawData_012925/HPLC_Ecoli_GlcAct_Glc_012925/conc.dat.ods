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D2G</text:p>
          </table:table-cell>
          <table:table-cell office:value-type="string" calcext:value-type="string">
            <text:p>OD3G</text:p>
          </table:table-cell>
          <table:table-cell office:value-type="string" calcext:value-type="string">
            <text:p>OD5G</text:p>
          </table:table-cell>
          <table:table-cell office:value-type="string" calcext:value-type="string">
            <text:p>OD8G</text:p>
          </table:table-cell>
          <table:table-cell office:value-type="string" calcext:value-type="string">
            <text:p>OD4G</text:p>
          </table:table-cell>
          <table:table-cell office:value-type="string" calcext:value-type="string">
            <text:p>OD9G</text:p>
          </table:table-cell>
          <table:table-cell office:value-type="string" calcext:value-type="string">
            <text:p>OD12G</text:p>
          </table:table-cell>
          <table:table-cell office:value-type="string" calcext:value-type="string">
            <text:p>OD13G</text:p>
          </table:table-cell>
          <table:table-cell office:value-type="string" calcext:value-type="string">
            <text:p>OD2A</text:p>
          </table:table-cell>
          <table:table-cell office:value-type="string" calcext:value-type="string">
            <text:p>OD3A</text:p>
          </table:table-cell>
          <table:table-cell office:value-type="string" calcext:value-type="string">
            <text:p>OD5A</text:p>
          </table:table-cell>
          <table:table-cell office:value-type="string" calcext:value-type="string">
            <text:p>OD8A</text:p>
          </table:table-cell>
          <table:table-cell office:value-type="string" calcext:value-type="string">
            <text:p>OD4A</text:p>
          </table:table-cell>
          <table:table-cell office:value-type="string" calcext:value-type="string">
            <text:p>OD9A</text:p>
          </table:table-cell>
          <table:table-cell office:value-type="string" calcext:value-type="string">
            <text:p>OD12A</text:p>
          </table:table-cell>
          <table:table-cell office:value-type="string" calcext:value-type="string">
            <text:p>OD13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8154593" calcext:value-type="float">
            <text:p>0.958154593</text:p>
          </table:table-cell>
          <table:table-cell office:value-type="float" office:value="0.956964113" calcext:value-type="float">
            <text:p>0.956964113</text:p>
          </table:table-cell>
          <table:table-cell office:value-type="float" office:value="0.945944409" calcext:value-type="float">
            <text:p>0.945944409</text:p>
          </table:table-cell>
          <table:table-cell office:value-type="float" office:value="1.000487156" calcext:value-type="float">
            <text:p>1.000487156</text:p>
          </table:table-cell>
          <table:table-cell office:value-type="float" office:value="0.67924001" calcext:value-type="float">
            <text:p>0.67924001</text:p>
          </table:table-cell>
          <table:table-cell office:value-type="float" office:value="0.611080501" calcext:value-type="float">
            <text:p>0.611080501</text:p>
          </table:table-cell>
          <table:table-cell office:value-type="float" office:value="0.751641251" calcext:value-type="float">
            <text:p>0.75164125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15843701" calcext:value-type="float">
            <text:p>1.015843701</text:p>
          </table:table-cell>
          <table:table-cell office:value-type="float" office:value="0.750154445" calcext:value-type="float">
            <text:p>0.750154445</text:p>
          </table:table-cell>
          <table:table-cell office:value-type="float" office:value="0.991608375" calcext:value-type="float">
            <text:p>0.991608375</text:p>
          </table:table-cell>
          <table:table-cell office:value-type="float" office:value="0.905467442" calcext:value-type="float">
            <text:p>0.905467442</text:p>
          </table:table-cell>
          <table:table-cell office:value-type="float" office:value="0.89029788" calcext:value-type="float">
            <text:p>0.89029788</text:p>
          </table:table-cell>
          <table:table-cell office:value-type="float" office:value="0.857626968" calcext:value-type="float">
            <text:p>0.857626968</text:p>
          </table:table-cell>
          <table:table-cell office:value-type="float" office:value="0.997844808" calcext:value-type="float">
            <text:p>0.997844808</text:p>
          </table:table-cell>
          <table:table-cell office:value-type="float" office:value="0.662735687" calcext:value-type="float">
            <text:p>0.662735687</text:p>
          </table:table-cell>
          <table:table-cell office:value-type="float" office:value="0.20651352" calcext:value-type="float">
            <text:p>0.20651352</text:p>
          </table:table-cell>
          <table:table-cell office:value-type="float" office:value="0.2043704" calcext:value-type="float">
            <text:p>0.2043704</text:p>
          </table:table-cell>
          <table:table-cell office:value-type="float" office:value="0.23807896" calcext:value-type="float">
            <text:p>0.23807896</text:p>
          </table:table-cell>
          <table:table-cell office:value-type="float" office:value="0.3547672" calcext:value-type="float">
            <text:p>0.3547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9488" calcext:value-type="float">
            <text:p>0.13594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3678295" calcext:value-type="float">
            <text:p>0.843678295</text:p>
          </table:table-cell>
          <table:table-cell office:value-type="float" office:value="0.137074067" calcext:value-type="float">
            <text:p>0.137074067</text:p>
          </table:table-cell>
          <table:table-cell office:value-type="float" office:value="0.729931166" calcext:value-type="float">
            <text:p>0.729931166</text:p>
          </table:table-cell>
          <table:table-cell table:style-name="ce1" office:value-type="float" office:value="0.713833159" calcext:value-type="float">
            <text:p>0.713833159</text:p>
          </table:table-cell>
          <table:table-cell office:value-type="float" office:value="0.417665027" calcext:value-type="float">
            <text:p>0.417665027</text:p>
          </table:table-cell>
          <table:table-cell office:value-type="float" office:value="0.729640663" calcext:value-type="float">
            <text:p>0.729640663</text:p>
          </table:table-cell>
          <table:table-cell office:value-type="float" office:value="0.79155274" calcext:value-type="float">
            <text:p>0.79155274</text:p>
          </table:table-cell>
          <table:table-cell office:value-type="float" office:value="0.291791824" calcext:value-type="float">
            <text:p>0.291791824</text:p>
          </table:table-cell>
          <table:table-cell office:value-type="float" office:value="0.3139344" calcext:value-type="float">
            <text:p>0.3139344</text:p>
          </table:table-cell>
          <table:table-cell office:value-type="float" office:value="0.450382" calcext:value-type="float">
            <text:p>0.450382</text:p>
          </table:table-cell>
          <table:table-cell office:value-type="float" office:value="0.38687272" calcext:value-type="float">
            <text:p>0.38687272</text:p>
          </table:table-cell>
          <table:table-cell office:value-type="float" office:value="0.3457372" calcext:value-type="float">
            <text:p>0.3457372</text:p>
          </table:table-cell>
          <table:table-cell office:value-type="float" office:value="0.26855736" calcext:value-type="float">
            <text:p>0.26855736</text:p>
          </table:table-cell>
          <table:table-cell office:value-type="float" office:value="0.12525384" calcext:value-type="float">
            <text:p>0.12525384</text:p>
          </table:table-cell>
          <table:table-cell office:value-type="float" office:value="0.09779232" calcext:value-type="float">
            <text:p>0.09779232</text:p>
          </table:table-cell>
          <table:table-cell office:value-type="float" office:value="0.28814472" calcext:value-type="float">
            <text:p>0.288144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335793" calcext:value-type="float">
            <text:p>0.000335793</text:p>
          </table:table-cell>
          <table:table-cell office:value-type="float" office:value="0.003370223" calcext:value-type="float">
            <text:p>0.003370223</text:p>
          </table:table-cell>
          <table:table-cell office:value-type="float" office:value="0.003652962" calcext:value-type="float">
            <text:p>0.003652962</text:p>
          </table:table-cell>
          <table:table-cell table:style-name="ce1" office:value-type="float" office:value="0.182251475" calcext:value-type="float">
            <text:p>0.182251475</text:p>
          </table:table-cell>
          <table:table-cell office:value-type="float" office:value="0.009324564" calcext:value-type="float">
            <text:p>0.009324564</text:p>
          </table:table-cell>
          <table:table-cell office:value-type="float" office:value="0.112446659" calcext:value-type="float">
            <text:p>0.11244665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43816656" calcext:value-type="float">
            <text:p>0.43816656</text:p>
          </table:table-cell>
          <table:table-cell office:value-type="float" office:value="0.49153472" calcext:value-type="float">
            <text:p>0.49153472</text:p>
          </table:table-cell>
          <table:table-cell office:value-type="float" office:value="0.4399932" calcext:value-type="float">
            <text:p>0.4399932</text:p>
          </table:table-cell>
          <table:table-cell office:value-type="float" office:value="0.22027008" calcext:value-type="float">
            <text:p>0.22027008</text:p>
          </table:table-cell>
          <table:table-cell office:value-type="float" office:value="0.2793452" calcext:value-type="float">
            <text:p>0.2793452</text:p>
          </table:table-cell>
          <table:table-cell office:value-type="float" office:value="0.46296896" calcext:value-type="float">
            <text:p>0.462968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753108" calcext:value-type="float">
            <text:p>0.00753108</text:p>
          </table:table-cell>
          <table:table-cell office:value-type="float" office:value="0.003504799" calcext:value-type="float">
            <text:p>0.003504799</text:p>
          </table:table-cell>
          <table:table-cell office:value-type="float" office:value="0.007846816" calcext:value-type="float">
            <text:p>0.007846816</text:p>
          </table:table-cell>
          <table:table-cell office:value-type="float" office:value="0.00753108" calcext:value-type="float">
            <text:p>0.00753108</text:p>
          </table:table-cell>
          <table:table-cell office:value-type="float" office:value="0.005753771" calcext:value-type="float">
            <text:p>0.005753771</text:p>
          </table:table-cell>
          <table:table-cell office:value-type="float" office:value="0.039651395" calcext:value-type="float">
            <text:p>0.039651395</text:p>
          </table:table-cell>
          <table:table-cell office:value-type="float" office:value="0.049304635" calcext:value-type="float">
            <text:p>0.049304635</text:p>
          </table:table-cell>
          <table:table-cell office:value-type="float" office:value="0" calcext:value-type="float">
            <text:p>0</text:p>
          </table:table-cell>
          <table:table-cell office:value-type="float" office:value="0.47403544" calcext:value-type="float">
            <text:p>0.47403544</text:p>
          </table:table-cell>
          <table:table-cell office:value-type="float" office:value="0.35353912" calcext:value-type="float">
            <text:p>0.35353912</text:p>
          </table:table-cell>
          <table:table-cell office:value-type="float" office:value="0.14338608" calcext:value-type="float">
            <text:p>0.14338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8204" calcext:value-type="float">
            <text:p>0.2108204</text:p>
          </table:table-cell>
          <table:table-cell office:value-type="float" office:value="0.2621452" calcext:value-type="float">
            <text:p>0.2621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6799584" calcext:value-type="float">
            <text:p>0.16799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03064" calcext:value-type="float">
            <text:p>0.0303064</text:p>
          </table:table-cell>
          <table:table-cell office:value-type="float" office:value="0.06848352" calcext:value-type="float">
            <text:p>0.0684835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table:style-name="ce2" table:number-columns-repeated="8"/>
        </table:table-row>
        <table:table-row table:style-name="ro1">
          <table:table-cell table:number-columns-repeated="9"/>
          <table:table-cell table:style-name="ce2" table:number-columns-repeated="7"/>
          <table:table-cell table:style-name="ce3"/>
        </table:table-row>
        <table:table-row table:style-name="ro1" table:number-rows-repeated="4">
          <table:table-cell table:number-columns-repeated="9"/>
          <table:table-cell table:style-name="ce2" table:number-columns-repeated="8"/>
        </table:table-row>
        <table:table-row table:style-name="ro1">
          <table:table-cell table:number-columns-repeated="9"/>
          <table:table-cell table:style-name="ce2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01T10:19:37.710681935</meta:creation-date>
    <dc:date>2025-09-01T11:20:44.004296214</dc:date>
    <meta:editing-duration>PT10M29S</meta:editing-duration>
    <meta:editing-cycles>2</meta:editing-cycles>
    <meta:generator>LibreOffice/6.4.7.2$Linux_X86_64 LibreOffice_project/40$Build-2</meta:generator>
    <meta:document-statistic meta:table-count="1" meta:cell-count="136" meta:object-count="0"/>
    <meta:user-defined meta:name="ProgId">Excel.Sheet</meta:user-defined>
  </office:meta>
</office:document-meta>
</file>